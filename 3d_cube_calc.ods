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a202"/>
    </style:style>
    <style:style style:name="ce2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999999"/>
      <style:text-properties fo:color="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4ea6b"/>
      <style:text-properties fo:color="#5b277d" fo:font-weight="bold" style:font-weight-asian="bold" style:font-weight-complex="bold"/>
    </style:style>
    <style:style style:name="ce9" style:family="table-cell" style:parent-style-name="Default">
      <style:table-cell-properties fo:background-color="#b2b2b2"/>
      <style:text-properties fo: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189in" svg:height="3.5429in" svg:x="6.9508in" svg:y="3.7035in">
            <draw:object draw:notify-on-update-of-ranges="Sheet1.H10:Sheet1.H17 Sheet1.I10:Sheet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enter X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enter Y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8" office:value-type="string" calcext:value-type="string">
            <text:p>Z offset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MULT</text:p>
          </table:table-cell>
          <table:table-cell table:style-name="ce8" office:value-type="float" office:value="70" calcext:value-type="float">
            <text:p>70</text:p>
          </table:table-cell>
          <table:table-cell/>
          <table:table-cell office:value-type="string" calcext:value-type="string">
            <text:p>Angl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Z Rot, Offs.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Points</text:p>
          </table:table-cell>
          <table:table-cell/>
          <table:table-cell table:style-name="ce6" office:value-type="string" calcext:value-type="string">
            <text:p>3D X</text:p>
          </table:table-cell>
          <table:table-cell table:style-name="ce6" office:value-type="string" calcext:value-type="string">
            <text:p>3D Y</text:p>
          </table:table-cell>
          <table:table-cell table:style-name="ce6" office:value-type="string" calcext:value-type="string">
            <text:p>3D Z</text:p>
          </table:table-cell>
          <table:table-cell/>
          <table:table-cell table:style-name="ce6" office:value-type="string" calcext:value-type="string">
            <text:p>2D X</text:p>
          </table:table-cell>
          <table:table-cell table:style-name="ce6" office:value-type="string" calcext:value-type="string">
            <text:p>2D Y</text:p>
          </table:table-cell>
          <table:table-cell/>
          <table:table-cell table:style-name="ce9" office:value-type="string" calcext:value-type="string">
            <text:p>Rot. X</text:p>
          </table:table-cell>
          <table:table-cell table:style-name="ce9" office:value-type="string" calcext:value-type="string">
            <text:p>Rot. Y</text:p>
          </table:table-cell>
          <table:table-cell table:style-name="ce9" office:value-type="string" calcext:value-type="string">
            <text:p>Rot. Z</text:p>
          </table:table-cell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1+[.$E$5]" office:value-type="float" office:value="1" calcext:value-type="float">
            <text:p>1</text:p>
          </table:table-cell>
          <table:table-cell/>
          <table:table-cell table:formula="of:=[.K10]/[.M10]" office:value-type="float" office:value="0.375903949688318" calcext:value-type="float">
            <text:p>0.375903949688318</text:p>
          </table:table-cell>
          <table:table-cell table:formula="of:=[.L10]/[.M10]" office:value-type="float" office:value="0.275180789937664" calcext:value-type="float">
            <text:p>0.275180789937664</text:p>
          </table:table-cell>
          <table:table-cell/>
          <table:table-cell table:formula="of:=[.D10]*COS(RADIANS([.$K$5]))-[.F10]*SIN(RADIANS([.$K$5]))" office:value-type="float" office:value="-1.36602540378444" calcext:value-type="float">
            <text:p>-1.36602540378444</text:p>
          </table:table-cell>
          <table:table-cell table:formula="of:=[.E10]" office:value-type="float" office:value="-1" calcext:value-type="float">
            <text:p>-1</text:p>
          </table:table-cell>
          <table:table-cell table:formula="of:=[.D10]*SIN(RADIANS([.$K$5]))+[.F10]*COS(RADIANS([.$K$5])) + [.$K$6]" office:value-type="float" office:value="-3.63397459621556" calcext:value-type="float">
            <text:p>-3.63397459621556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1+[.$E$5]" office:value-type="float" office:value="1" calcext:value-type="float">
            <text:p>1</text:p>
          </table:table-cell>
          <table:table-cell/>
          <table:table-cell table:formula="of:=[.K11]/[.M11]" office:value-type="float" office:value="-0.138963148813332" calcext:value-type="float">
            <text:p>-0.138963148813332</text:p>
          </table:table-cell>
          <table:table-cell table:formula="of:=[.L11]/[.M11]" office:value-type="float" office:value="0.379654382937777" calcext:value-type="float">
            <text:p>0.379654382937777</text:p>
          </table:table-cell>
          <table:table-cell/>
          <table:table-cell table:formula="of:=[.D11]*COS(RADIANS([.$K$5]))-[.F11]*SIN(RADIANS([.$K$5]))" office:value-type="float" office:value="0.366025403784439" calcext:value-type="float">
            <text:p>0.366025403784439</text:p>
          </table:table-cell>
          <table:table-cell table:formula="of:=[.E11]" office:value-type="float" office:value="-1" calcext:value-type="float">
            <text:p>-1</text:p>
          </table:table-cell>
          <table:table-cell table:formula="of:=[.D11]*SIN(RADIANS([.$K$5]))+[.F11]*COS(RADIANS([.$K$5])) + [.$K$6]" office:value-type="float" office:value="-2.63397459621556" calcext:value-type="float">
            <text:p>-2.63397459621556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1+[.$E$5]" office:value-type="float" office:value="1" calcext:value-type="float">
            <text:p>1</text:p>
          </table:table-cell>
          <table:table-cell/>
          <table:table-cell table:formula="of:=[.K12]/[.M12]" office:value-type="float" office:value="-0.138963148813332" calcext:value-type="float">
            <text:p>-0.138963148813332</text:p>
          </table:table-cell>
          <table:table-cell table:formula="of:=[.L12]/[.M12]" office:value-type="float" office:value="-0.379654382937777" calcext:value-type="float">
            <text:p>-0.379654382937777</text:p>
          </table:table-cell>
          <table:table-cell/>
          <table:table-cell table:formula="of:=[.D12]*COS(RADIANS([.$K$5]))-[.F12]*SIN(RADIANS([.$K$5]))" office:value-type="float" office:value="0.366025403784439" calcext:value-type="float">
            <text:p>0.366025403784439</text:p>
          </table:table-cell>
          <table:table-cell table:formula="of:=[.E12]" office:value-type="float" office:value="1" calcext:value-type="float">
            <text:p>1</text:p>
          </table:table-cell>
          <table:table-cell table:formula="of:=[.D12]*SIN(RADIANS([.$K$5]))+[.F12]*COS(RADIANS([.$K$5])) + [.$K$6]" office:value-type="float" office:value="-2.63397459621556" calcext:value-type="float">
            <text:p>-2.63397459621556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1+[.$E$5]" office:value-type="float" office:value="1" calcext:value-type="float">
            <text:p>1</text:p>
          </table:table-cell>
          <table:table-cell/>
          <table:table-cell table:formula="of:=[.K13]/[.M13]" office:value-type="float" office:value="0.375903949688318" calcext:value-type="float">
            <text:p>0.375903949688318</text:p>
          </table:table-cell>
          <table:table-cell table:formula="of:=[.L13]/[.M13]" office:value-type="float" office:value="-0.275180789937664" calcext:value-type="float">
            <text:p>-0.275180789937664</text:p>
          </table:table-cell>
          <table:table-cell/>
          <table:table-cell table:formula="of:=[.D13]*COS(RADIANS([.$K$5]))-[.F13]*SIN(RADIANS([.$K$5]))" office:value-type="float" office:value="-1.36602540378444" calcext:value-type="float">
            <text:p>-1.36602540378444</text:p>
          </table:table-cell>
          <table:table-cell table:formula="of:=[.E13]" office:value-type="float" office:value="1" calcext:value-type="float">
            <text:p>1</text:p>
          </table:table-cell>
          <table:table-cell table:formula="of:=[.D13]*SIN(RADIANS([.$K$5]))+[.F13]*COS(RADIANS([.$K$5])) + [.$K$6]" office:value-type="float" office:value="-3.63397459621556" calcext:value-type="float">
            <text:p>-3.63397459621556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-1+[.$E$5]" office:value-type="float" office:value="-1" calcext:value-type="float">
            <text:p>-1</text:p>
          </table:table-cell>
          <table:table-cell/>
          <table:table-cell table:formula="of:=[.K14]/[.M14]" office:value-type="float" office:value="0.0682116419960099" calcext:value-type="float">
            <text:p>0.0682116419960099</text:p>
          </table:table-cell>
          <table:table-cell table:formula="of:=[.L14]/[.M14]" office:value-type="float" office:value="0.186357671600798" calcext:value-type="float">
            <text:p>0.186357671600798</text:p>
          </table:table-cell>
          <table:table-cell/>
          <table:table-cell table:formula="of:=[.D14]*COS(RADIANS([.$K$5]))-[.F14]*SIN(RADIANS([.$K$5]))" office:value-type="float" office:value="-0.366025403784439" calcext:value-type="float">
            <text:p>-0.366025403784439</text:p>
          </table:table-cell>
          <table:table-cell table:formula="of:=[.E14]" office:value-type="float" office:value="-1" calcext:value-type="float">
            <text:p>-1</text:p>
          </table:table-cell>
          <table:table-cell table:formula="of:=[.D14]*SIN(RADIANS([.$K$5]))+[.F14]*COS(RADIANS([.$K$5])) + [.$K$6]" office:value-type="float" office:value="-5.36602540378444" calcext:value-type="float">
            <text:p>-5.36602540378444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1+[.$E$5]" office:value-type="float" office:value="-1" calcext:value-type="float">
            <text:p>-1</text:p>
          </table:table-cell>
          <table:table-cell/>
          <table:table-cell table:formula="of:=[.K15]/[.M15]" office:value-type="float" office:value="-0.312876192291593" calcext:value-type="float">
            <text:p>-0.312876192291593</text:p>
          </table:table-cell>
          <table:table-cell table:formula="of:=[.L15]/[.M15]" office:value-type="float" office:value="0.229041269236136" calcext:value-type="float">
            <text:p>0.229041269236136</text:p>
          </table:table-cell>
          <table:table-cell/>
          <table:table-cell table:formula="of:=[.D15]*COS(RADIANS([.$K$5]))-[.F15]*SIN(RADIANS([.$K$5]))" office:value-type="float" office:value="1.36602540378444" calcext:value-type="float">
            <text:p>1.36602540378444</text:p>
          </table:table-cell>
          <table:table-cell table:formula="of:=[.E15]" office:value-type="float" office:value="-1" calcext:value-type="float">
            <text:p>-1</text:p>
          </table:table-cell>
          <table:table-cell table:formula="of:=[.D15]*SIN(RADIANS([.$K$5]))+[.F15]*COS(RADIANS([.$K$5])) + [.$K$6]" office:value-type="float" office:value="-4.36602540378444" calcext:value-type="float">
            <text:p>-4.36602540378444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1+[.$E$5]" office:value-type="float" office:value="-1" calcext:value-type="float">
            <text:p>-1</text:p>
          </table:table-cell>
          <table:table-cell/>
          <table:table-cell table:formula="of:=[.K16]/[.M16]" office:value-type="float" office:value="-0.312876192291593" calcext:value-type="float">
            <text:p>-0.312876192291593</text:p>
          </table:table-cell>
          <table:table-cell table:formula="of:=[.L16]/[.M16]" office:value-type="float" office:value="-0.229041269236136" calcext:value-type="float">
            <text:p>-0.229041269236136</text:p>
          </table:table-cell>
          <table:table-cell/>
          <table:table-cell table:formula="of:=[.D16]*COS(RADIANS([.$K$5]))-[.F16]*SIN(RADIANS([.$K$5]))" office:value-type="float" office:value="1.36602540378444" calcext:value-type="float">
            <text:p>1.36602540378444</text:p>
          </table:table-cell>
          <table:table-cell table:formula="of:=[.E16]" office:value-type="float" office:value="1" calcext:value-type="float">
            <text:p>1</text:p>
          </table:table-cell>
          <table:table-cell table:formula="of:=[.D16]*SIN(RADIANS([.$K$5]))+[.F16]*COS(RADIANS([.$K$5])) + [.$K$6]" office:value-type="float" office:value="-4.36602540378444" calcext:value-type="float">
            <text:p>-4.36602540378444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1+[.$E$5]" office:value-type="float" office:value="-1" calcext:value-type="float">
            <text:p>-1</text:p>
          </table:table-cell>
          <table:table-cell/>
          <table:table-cell table:formula="of:=[.K17]/[.M17]" office:value-type="float" office:value="0.0682116419960099" calcext:value-type="float">
            <text:p>0.0682116419960099</text:p>
          </table:table-cell>
          <table:table-cell table:formula="of:=[.L17]/[.M17]" office:value-type="float" office:value="-0.186357671600798" calcext:value-type="float">
            <text:p>-0.186357671600798</text:p>
          </table:table-cell>
          <table:table-cell/>
          <table:table-cell table:formula="of:=[.D17]*COS(RADIANS([.$K$5]))-[.F17]*SIN(RADIANS([.$K$5]))" office:value-type="float" office:value="-0.366025403784439" calcext:value-type="float">
            <text:p>-0.366025403784439</text:p>
          </table:table-cell>
          <table:table-cell table:formula="of:=[.E17]" office:value-type="float" office:value="1" calcext:value-type="float">
            <text:p>1</text:p>
          </table:table-cell>
          <table:table-cell table:formula="of:=[.D17]*SIN(RADIANS([.$K$5]))+[.F17]*COS(RADIANS([.$K$5])) + [.$K$6]" office:value-type="float" office:value="-5.36602540378444" calcext:value-type="float">
            <text:p>-5.3660254037844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5" table:number-columns-repeated="2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2D X – MULT</text:p>
          </table:table-cell>
          <table:table-cell table:style-name="ce6" office:value-type="string" calcext:value-type="string">
            <text:p>2D Y – MULT</text:p>
          </table:table-cell>
          <table:table-cell/>
          <table:table-cell table:style-name="ce6" office:value-type="string" calcext:value-type="string">
            <text:p>Centr X</text:p>
          </table:table-cell>
          <table:table-cell table:style-name="ce6" office:value-type="string" calcext:value-type="string">
            <text:p>Centr Y</text:p>
          </table:table-cell>
          <table:table-cell table:number-columns-repeated="7"/>
        </table:table-row>
        <table:table-row table:style-name="ro1">
          <table:table-cell/>
          <table:table-cell table:formula="of:=[.H10]*[.$H$5]" office:value-type="float" office:value="26.3132764781822" calcext:value-type="float">
            <text:p>26.3132764781822</text:p>
          </table:table-cell>
          <table:table-cell table:formula="of:=[.I10]*[.$H$5]" office:value-type="float" office:value="19.2626552956365" calcext:value-type="float">
            <text:p>19.2626552956365</text:p>
          </table:table-cell>
          <table:table-cell/>
          <table:table-cell table:formula="of:=ROUND([.B23]+[.$B$2])" office:value-type="float" office:value="90" calcext:value-type="float">
            <text:p>90</text:p>
          </table:table-cell>
          <table:table-cell table:formula="of:=ROUND([.C23]+[.$B$3])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/>
          <table:table-cell table:formula="of:=[.H11]*[.$H$5]" office:value-type="float" office:value="-9.72742041693323" calcext:value-type="float">
            <text:p>-9.72742041693323</text:p>
          </table:table-cell>
          <table:table-cell table:formula="of:=[.I11]*[.$H$5]" office:value-type="float" office:value="26.5758068056444" calcext:value-type="float">
            <text:p>26.5758068056444</text:p>
          </table:table-cell>
          <table:table-cell/>
          <table:table-cell table:formula="of:=ROUND([.B24]+[.$B$2])" office:value-type="float" office:value="54" calcext:value-type="float">
            <text:p>54</text:p>
          </table:table-cell>
          <table:table-cell table:formula="of:=ROUND([.C24]+[.$B$3])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formula="of:=[.H12]*[.$H$5]" office:value-type="float" office:value="-9.72742041693323" calcext:value-type="float">
            <text:p>-9.72742041693323</text:p>
          </table:table-cell>
          <table:table-cell table:formula="of:=[.I12]*[.$H$5]" office:value-type="float" office:value="-26.5758068056444" calcext:value-type="float">
            <text:p>-26.5758068056444</text:p>
          </table:table-cell>
          <table:table-cell/>
          <table:table-cell table:formula="of:=ROUND([.B25]+[.$B$2])" office:value-type="float" office:value="54" calcext:value-type="float">
            <text:p>54</text:p>
          </table:table-cell>
          <table:table-cell table:formula="of:=ROUND([.C25]+[.$B$3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.H13]*[.$H$5]" office:value-type="float" office:value="26.3132764781822" calcext:value-type="float">
            <text:p>26.3132764781822</text:p>
          </table:table-cell>
          <table:table-cell table:formula="of:=[.I13]*[.$H$5]" office:value-type="float" office:value="-19.2626552956365" calcext:value-type="float">
            <text:p>-19.2626552956365</text:p>
          </table:table-cell>
          <table:table-cell/>
          <table:table-cell table:formula="of:=ROUND([.B26]+[.$B$2])" office:value-type="float" office:value="90" calcext:value-type="float">
            <text:p>90</text:p>
          </table:table-cell>
          <table:table-cell table:formula="of:=ROUND([.C26]+[.$B$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formula="of:=[.H14]*[.$H$5]" office:value-type="float" office:value="4.7748149397207" calcext:value-type="float">
            <text:p>4.7748149397207</text:p>
          </table:table-cell>
          <table:table-cell table:formula="of:=[.I14]*[.$H$5]" office:value-type="float" office:value="13.0450370120559" calcext:value-type="float">
            <text:p>13.0450370120559</text:p>
          </table:table-cell>
          <table:table-cell/>
          <table:table-cell table:formula="of:=ROUND([.B27]+[.$B$2])" office:value-type="float" office:value="69" calcext:value-type="float">
            <text:p>69</text:p>
          </table:table-cell>
          <table:table-cell table:formula="of:=ROUND([.C27]+[.$B$3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table:formula="of:=[.H15]*[.$H$5]" office:value-type="float" office:value="-21.9013334604115" calcext:value-type="float">
            <text:p>-21.9013334604115</text:p>
          </table:table-cell>
          <table:table-cell table:formula="of:=[.I15]*[.$H$5]" office:value-type="float" office:value="16.0328888465295" calcext:value-type="float">
            <text:p>16.0328888465295</text:p>
          </table:table-cell>
          <table:table-cell/>
          <table:table-cell table:formula="of:=ROUND([.B28]+[.$B$2])" office:value-type="float" office:value="42" calcext:value-type="float">
            <text:p>42</text:p>
          </table:table-cell>
          <table:table-cell table:formula="of:=ROUND([.C28]+[.$B$3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/>
          <table:table-cell table:formula="of:=[.H16]*[.$H$5]" office:value-type="float" office:value="-21.9013334604115" calcext:value-type="float">
            <text:p>-21.9013334604115</text:p>
          </table:table-cell>
          <table:table-cell table:formula="of:=[.I16]*[.$H$5]" office:value-type="float" office:value="-16.0328888465295" calcext:value-type="float">
            <text:p>-16.0328888465295</text:p>
          </table:table-cell>
          <table:table-cell/>
          <table:table-cell table:formula="of:=ROUND([.B29]+[.$B$2])" office:value-type="float" office:value="42" calcext:value-type="float">
            <text:p>42</text:p>
          </table:table-cell>
          <table:table-cell table:formula="of:=ROUND([.C29]+[.$B$3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H17]*[.$H$5]" office:value-type="float" office:value="4.7748149397207" calcext:value-type="float">
            <text:p>4.7748149397207</text:p>
          </table:table-cell>
          <table:table-cell table:formula="of:=[.I17]*[.$H$5]" office:value-type="float" office:value="-13.0450370120559" calcext:value-type="float">
            <text:p>-13.0450370120559</text:p>
          </table:table-cell>
          <table:table-cell/>
          <table:table-cell table:formula="of:=ROUND([.B30]+[.$B$2])" office:value-type="float" office:value="69" calcext:value-type="float">
            <text:p>69</text:p>
          </table:table-cell>
          <table:table-cell table:formula="of:=ROUND([.C30]+[.$B$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Xc = x / z</text:p>
          </table:table-cell>
          <table:table-cell table:style-name="ce7"/>
          <table:table-cell table:number-columns-repeated="11"/>
        </table:table-row>
        <table:table-row table:style-name="ro1">
          <table:table-cell table:style-name="ce2" office:value-type="string" calcext:value-type="string">
            <text:p>Yc = y / z</text:p>
          </table:table-cell>
          <table:table-cell table:style-name="ce7"/>
          <table:table-cell table:number-columns-repeated="11"/>
        </table:table-row>
        <table:table-row table:style-name="ro1">
          <table:table-cell table:style-name="ce3" office:value-type="string" calcext:value-type="string">
            <text:p>X’ = x*cos(a) – y*sin(a)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3" office:value-type="string" calcext:value-type="string">
            <text:p>Y’ = x*sin(a) + y*cos(a)</text:p>
          </table:table-cell>
          <table:table-cell table:style-name="ce3"/>
          <table:table-cell/>
          <table:table-cell office:value-type="string" calcext:value-type="string">
            <text:p>{</text:p>
          </table:table-cell>
          <table:table-cell table:formula="of:=[.E23]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formula="of:=[.F23]" office:value-type="float" office:value="51" calcext:value-type="float">
            <text:p>51</text:p>
          </table:table-cell>
          <table:table-cell office:value-type="string" calcext:value-type="string">
            <text:p>}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{</text:p>
          </table:table-cell>
          <table:table-cell table:formula="of:=[.E24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F24]" office:value-type="float" office:value="59" calcext:value-type="float">
            <text:p>59</text:p>
          </table:table-cell>
          <table:table-cell office:value-type="string" calcext:value-type="string">
            <text:p>}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{</text:p>
          </table:table-cell>
          <table:table-cell table:formula="of:=[.E25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F25]" office:value-type="float" office:value="5" calcext:value-type="float">
            <text:p>5</text:p>
          </table:table-cell>
          <table:table-cell office:value-type="string" calcext:value-type="string">
            <text:p>}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{</text:p>
          </table:table-cell>
          <table:table-cell table:formula="of:=[.E26]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formula="of:=[.F26]" office:value-type="float" office:value="13" calcext:value-type="float">
            <text:p>13</text:p>
          </table:table-cell>
          <table:table-cell office:value-type="string" calcext:value-type="string">
            <text:p>}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{</text:p>
          </table:table-cell>
          <table:table-cell table:formula="of:=[.E27]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formula="of:=[.F27]" office:value-type="float" office:value="45" calcext:value-type="float">
            <text:p>45</text:p>
          </table:table-cell>
          <table:table-cell office:value-type="string" calcext:value-type="string">
            <text:p>}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{</text:p>
          </table:table-cell>
          <table:table-cell table:formula="of:=[.E28]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formula="of:=[.F28]" office:value-type="float" office:value="48" calcext:value-type="float">
            <text:p>48</text:p>
          </table:table-cell>
          <table:table-cell office:value-type="string" calcext:value-type="string">
            <text:p>}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{</text:p>
          </table:table-cell>
          <table:table-cell table:formula="of:=[.E29]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formula="of:=[.F29]" office:value-type="float" office:value="16" calcext:value-type="float">
            <text:p>16</text:p>
          </table:table-cell>
          <table:table-cell office:value-type="string" calcext:value-type="string">
            <text:p>}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{</text:p>
          </table:table-cell>
          <table:table-cell table:formula="of:=[.E30]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formula="of:=[.F30]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02:58:21.968437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9T15:40:01.970453706</meta:creation-date>
    <dc:date>2026-07-10T02:58:58.260336679</dc:date>
    <meta:editing-duration>PT34M46S</meta:editing-duration>
    <meta:editing-cycles>2</meta:editing-cycles>
    <meta:generator>LibreOffice/25.8.7.3$Linux_X86_64 LibreOffice_project/580$Build-3</meta:generator>
    <meta:document-statistic meta:table-count="1" meta:cell-count="17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11cm" svg:height="9cm" xlink:href=".." xlink:type="simple" chart:class="chart:scatter" chart:style-name="ch1">
        <chart:plot-area chart:style-name="ch2" svg:x="0.27cm" svg:y="0.18cm" svg:width="12.971cm" svg:height="8.64cm">
          <chart:coordinate-region svg:x="0.567cm" svg:y="0.379cm" svg:width="12.433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I10:Sheet1.I17" chart:class="chart:scatter">
            <chart:domain table:cell-range-address="Sheet1.H10:Sheet1.H17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5903949688318">
                <text:p>0.375903949688318</text:p>
                <draw:g>
                  <svg:desc>Sheet1.H10:Sheet1.H17</svg:desc>
                </draw:g>
              </table:table-cell>
              <table:table-cell office:value-type="float" office:value="0.275180789937664">
                <text:p>0.275180789937664</text:p>
                <draw:g>
                  <svg:desc>Sheet1.I10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8963148813332">
                <text:p>-0.138963148813332</text:p>
              </table:table-cell>
              <table:table-cell office:value-type="float" office:value="0.379654382937777">
                <text:p>0.379654382937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38963148813332">
                <text:p>-0.138963148813332</text:p>
              </table:table-cell>
              <table:table-cell office:value-type="float" office:value="-0.379654382937777">
                <text:p>-0.379654382937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903949688318">
                <text:p>0.375903949688318</text:p>
              </table:table-cell>
              <table:table-cell office:value-type="float" office:value="-0.275180789937664">
                <text:p>-0.275180789937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2116419960099">
                <text:p>0.0682116419960099</text:p>
              </table:table-cell>
              <table:table-cell office:value-type="float" office:value="0.186357671600798">
                <text:p>0.186357671600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12876192291593">
                <text:p>-0.312876192291593</text:p>
              </table:table-cell>
              <table:table-cell office:value-type="float" office:value="0.229041269236136">
                <text:p>0.229041269236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12876192291593">
                <text:p>-0.312876192291593</text:p>
              </table:table-cell>
              <table:table-cell office:value-type="float" office:value="-0.229041269236136">
                <text:p>-0.229041269236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2116419960099">
                <text:p>0.0682116419960099</text:p>
              </table:table-cell>
              <table:table-cell office:value-type="float" office:value="-0.186357671600798">
                <text:p>-0.186357671600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